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b91" officeooo:paragraph-rsid="00093b91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text-properties style:font-name="Liberation Mono" fo:font-size="20pt"/>
    </style:style>
    <style:style style:name="P4" style:family="paragraph">
      <loext:graphic-properties draw:fill="none" draw:fill-color="#ffffff"/>
      <style:text-properties style:font-name="Liberation Mono" fo:font-size="20pt"/>
    </style:style>
    <style:style style:name="gr1" style:family="graphic">
      <style:graphic-properties style:run-through="background" style:vertical-pos="from-top" style:vertical-rel="paragraph" style:horizontal-pos="from-left" style:horizontal-rel="paragraph"/>
    </style:style>
    <style:style style:name="gr2" style:family="graphic">
      <style:graphic-properties style:run-through="background"/>
    </style:style>
    <style:style style:name="gr3" style:family="graphic">
      <style:graphic-properties draw:stroke="none" draw:fill="solid" draw:fill-color="#000000" draw:textarea-horizontal-align="center" draw:textarea-vertical-align="middle" style:run-through="background"/>
    </style:style>
    <style:style style:name="gr4" style:family="graphic">
      <style:graphic-properties draw:stroke="none" draw:fill="none" draw:fill-color="#ffffff" draw:textarea-horizontal-align="center" draw:auto-grow-height="true" draw:auto-grow-width="true" fo:min-height="0.0398in" style:run-through="background"/>
      <style:paragraph-properties style:writing-mode="lr-tb"/>
    </style:style>
    <style:style style:name="gr5" style:family="graphic">
      <style:graphic-properties draw:stroke="none" draw:fill="solid" draw:fill-color="#000000" draw:textarea-horizontal-align="center" draw:textarea-vertical-align="middle" style:run-through="back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4" draw:name="DrawObject 8" draw:style-name="gr1"><draw:g draw:name="DrawObject 10" draw:style-name="gr2"><draw:path draw:name="Shape 9" draw:style-name="gr3" draw:text-style-name="P2" svg:width="1.8657in" svg:height="1.1807in" svg:x="0.4272in" svg:y="0.0209in" svg:viewBox="0 0 4740 3000" svg:d="M0 0h60v3000h-60zM60 0h60v3000h-60zM180 0h60v3000h-60zM360 0h60v3000h-60zM660 0h60v3000h-60zM840 0h60v3000h-60zM1140 0h60v3000h-60zM1200 0h60v3000h-60zM1320 0h60v3000h-60zM1620 0h60v3000h-60zM1680 0h60v3000h-60zM1800 0h60v3000h-60zM1980 0h60v3000h-60zM2160 0h60v3000h-60zM2340 0h60v3000h-60zM2400 0h60v3000h-60zM2460 0h60v3000h-60zM2520 0h60v3000h-60zM2640 0h60v3000h-60zM2940 0h60v3000h-60zM3120 0h60v3000h-60zM3180 0h60v3000h-60zM3300 0h60v3000h-60zM3360 0h60v3000h-60zM3540 0h60v3000h-60zM3780 0h60v3000h-60zM3960 0h60v3000h-60zM4020 0h60v3000h-60zM4260 0h60v3000h-60zM4320 0h60v3000h-60zM4380 0h60v3000h-60zM4500 0h60v3000h-60zM4620 0h60v3000h-60zM4680 0h60v3000h-60z"><text:p/></draw:path></draw:g><draw:frame draw:name="Shape 10" draw:style-name="gr4" draw:text-style-name="P4" svg:width="0.6685in" svg:height="0.3157in" svg:x="1.0264in" svg:y="1.2516in"><draw:text-box><text:p text:style-name="P3">bird</text:p></draw:text-box></draw:frame></draw:g><draw:g text:anchor-type="paragraph" draw:z-index="5" draw:name="DrawObject 11" draw:style-name="gr1"><draw:g draw:name="DrawObject 12" draw:style-name="gr2"><draw:path draw:name="Shape 11" draw:style-name="gr3" draw:text-style-name="P2" svg:width="1.6059in" svg:height="1.1807in" svg:x="3.9598in" svg:y="3.0102in" svg:viewBox="0 0 4080 3000" svg:d="M0 0h60v3000h-60zM60 0h60v3000h-60zM180 0h60v3000h-60zM360 0h60v3000h-60zM660 0h60v3000h-60zM960 0h60v3000h-60zM1080 0h60v3000h-60zM1140 0h60v3000h-60zM1320 0h60v3000h-60zM1560 0h60v3000h-60zM1620 0h60v3000h-60zM1680 0h60v3000h-60zM1740 0h60v3000h-60zM1860 0h60v3000h-60zM1980 0h60v3000h-60zM2040 0h60v3000h-60zM2100 0h60v3000h-60zM2160 0h60v3000h-60zM2340 0h60v3000h-60zM2460 0h60v3000h-60zM2640 0h60v3000h-60zM2700 0h60v3000h-60zM3000 0h60v3000h-60zM3180 0h60v3000h-60zM3300 0h60v3000h-60zM3360 0h60v3000h-60zM3600 0h60v3000h-60zM3660 0h60v3000h-60zM3720 0h60v3000h-60zM3840 0h60v3000h-60zM3960 0h60v3000h-60zM4020 0h60v3000h-60z"><text:p/></draw:path></draw:g><draw:frame draw:name="Shape 12" draw:style-name="gr4" draw:text-style-name="P4" svg:width="0.5016in" svg:height="0.3157in" svg:x="4.5118in" svg:y="4.2409in"><draw:text-box><text:p text:style-name="P3">cow</text:p></draw:text-box></draw:frame></draw:g><draw:g text:anchor-type="paragraph" draw:z-index="6" draw:name="DrawObject 13" draw:style-name="gr1"><draw:g draw:name="DrawObject 14" draw:style-name="gr2"><draw:path draw:name="Shape 13" draw:style-name="gr5" draw:text-style-name="P2" svg:width="2.6453in" svg:height="1.1807in" svg:x="0.052in" svg:y="2.0835in" svg:viewBox="0 0 6720 3000" svg:d="M0 0h60v3000h-60zM60 0h60v3000h-60zM180 0h60v3000h-60zM360 0h60v3000h-60zM660 0h60v3000h-60zM960 0h60v3000h-60zM1080 0h60v3000h-60zM1140 0h60v3000h-60zM1320 0h60v3000h-60zM1500 0h60v3000h-60zM1560 0h60v3000h-60zM1860 0h60v3000h-60zM1980 0h60v3000h-60zM2280 0h60v3000h-60zM2340 0h60v3000h-60zM2460 0h60v3000h-60zM2640 0h60v3000h-60zM2940 0h60v3000h-60zM3060 0h60v3000h-60zM3120 0h60v3000h-60zM3300 0h60v3000h-60zM3360 0h60v3000h-60zM3660 0h60v3000h-60zM3840 0h60v3000h-60zM3960 0h60v3000h-60zM4080 0h60v3000h-60zM4140 0h60v3000h-60zM4320 0h60v3000h-60zM4620 0h60v3000h-60zM4680 0h60v3000h-60zM4980 0h60v3000h-60zM5100 0h60v3000h-60zM5280 0h60v3000h-60zM5340 0h60v3000h-60zM5400 0h60v3000h-60zM5460 0h60v3000h-60zM5580 0h60v3000h-60zM5640 0h60v3000h-60zM5700 0h60v3000h-60zM5820 0h60v3000h-60zM5940 0h60v3000h-60zM6000 0h60v3000h-60zM6240 0h60v3000h-60zM6300 0h60v3000h-60zM6360 0h60v3000h-60zM6480 0h60v3000h-60zM6600 0h60v3000h-60zM6660 0h60v3000h-60z"><text:p/></draw:path></draw:g><draw:frame draw:name="Shape 14" draw:style-name="gr4" draw:text-style-name="P4" svg:width="1.1685in" svg:height="0.3157in" svg:x="0.7909in" svg:y="3.3142in"><draw:text-box><text:p text:style-name="P3">chicken</text:p></draw:text-box></draw:frame></draw:g><draw:g text:anchor-type="paragraph" draw:z-index="7" draw:name="DrawObject 15" draw:style-name="gr1"><draw:g draw:name="DrawObject 16" draw:style-name="gr2"><draw:path draw:name="Shape 15" draw:style-name="gr3" draw:text-style-name="P2" svg:width="1.6059in" svg:height="1.1807in" svg:x="4.0291in" svg:y="1.0102in" svg:viewBox="0 0 4080 3000" svg:d="M0 0h60v3000h-60zM60 0h60v3000h-60zM180 0h60v3000h-60zM360 0h60v3000h-60zM660 0h60v3000h-60zM960 0h60v3000h-60zM1080 0h60v3000h-60zM1140 0h60v3000h-60zM1320 0h60v3000h-60zM1500 0h60v3000h-60zM1620 0h60v3000h-60zM1680 0h60v3000h-60zM1980 0h60v3000h-60zM2160 0h60v3000h-60zM2220 0h60v3000h-60zM2280 0h60v3000h-60zM2340 0h60v3000h-60zM2460 0h60v3000h-60zM2640 0h60v3000h-60zM2880 0h60v3000h-60zM2940 0h60v3000h-60zM3180 0h60v3000h-60zM3300 0h60v3000h-60zM3360 0h60v3000h-60zM3600 0h60v3000h-60zM3660 0h60v3000h-60zM3720 0h60v3000h-60zM3840 0h60v3000h-60zM3960 0h60v3000h-60zM4020 0h60v3000h-60z"><text:p/></draw:path></draw:g><draw:frame draw:name="Shape 16" draw:style-name="gr4" draw:text-style-name="P4" svg:width="0.5016in" svg:height="0.3157in" svg:x="4.5811in" svg:y="2.2409in"><draw:text-box><text:p text:style-name="P3">cat</text:p></draw:text-box></draw:frame></draw:g><draw:g text:anchor-type="paragraph" draw:z-index="8" draw:name="DrawObject 19" draw:style-name="gr1"><draw:g draw:name="DrawObject 20" draw:style-name="gr2"><draw:path draw:name="Shape 19" draw:style-name="gr3" draw:text-style-name="P2" svg:width="1.8657in" svg:height="1.1807in" svg:x="0.4138in" svg:y="4.2862in" svg:viewBox="0 0 4740 3000" svg:d="M0 0h60v3000h-60zM60 0h60v3000h-60zM180 0h60v3000h-60zM360 0h60v3000h-60zM660 0h60v3000h-60zM960 0h60v3000h-60zM1140 0h60v3000h-60zM1200 0h60v3000h-60zM1320 0h60v3000h-60zM1500 0h60v3000h-60zM1560 0h60v3000h-60zM1620 0h60v3000h-60zM1680 0h60v3000h-60zM1860 0h60v3000h-60zM1980 0h60v3000h-60zM2280 0h60v3000h-60zM2400 0h60v3000h-60zM2460 0h60v3000h-60zM2640 0h60v3000h-60zM2700 0h60v3000h-60zM3000 0h60v3000h-60zM3180 0h60v3000h-60zM3300 0h60v3000h-60zM3360 0h60v3000h-60zM3540 0h60v3000h-60zM3660 0h60v3000h-60zM3720 0h60v3000h-60zM3780 0h60v3000h-60zM3960 0h60v3000h-60zM4020 0h60v3000h-60zM4260 0h60v3000h-60zM4320 0h60v3000h-60zM4380 0h60v3000h-60zM4500 0h60v3000h-60zM4620 0h60v3000h-60zM4680 0h60v3000h-60z"><text:p/></draw:path></draw:g><draw:frame draw:name="Shape 20" draw:style-name="gr4" draw:text-style-name="P4" svg:width="0.6685in" svg:height="0.3157in" svg:x="1.013in" svg:y="5.5169in"><draw:text-box><text:p text:style-name="P3">duck</text:p></draw:text-box></draw:frame></draw:g><draw:g text:anchor-type="paragraph" draw:z-index="0" draw:name="DrawObject 1" draw:style-name="gr1"><draw:g draw:name="DrawObject 3" draw:style-name="gr2"><draw:path draw:name="Shape 3" draw:style-name="gr5" draw:text-style-name="P2" svg:width="2.1256in" svg:height="1.1807in" svg:x="3.75in" svg:y="4.911in" svg:viewBox="0 0 5400 3000" svg:d="M0 0h60v3000h-60zM60 0h60v3000h-60zM180 0h60v3000h-60zM360 0h60v3000h-60zM660 0h60v3000h-60zM960 0h60v3000h-60zM1140 0h60v3000h-60zM1200 0h60v3000h-60zM1320 0h60v3000h-60zM1500 0h60v3000h-60zM1560 0h60v3000h-60zM1620 0h60v3000h-60zM1680 0h60v3000h-60zM1860 0h60v3000h-60zM1980 0h60v3000h-60zM2280 0h60v3000h-60zM2400 0h60v3000h-60zM2460 0h60v3000h-60zM2640 0h60v3000h-60zM2700 0h60v3000h-60zM3000 0h60v3000h-60zM3180 0h60v3000h-60zM3300 0h60v3000h-60zM3480 0h60v3000h-60zM3540 0h60v3000h-60zM3600 0h60v3000h-60zM3720 0h60v3000h-60zM3780 0h60v3000h-60zM3960 0h60v3000h-60zM4080 0h60v3000h-60zM4140 0h60v3000h-60zM4200 0h60v3000h-60zM4320 0h60v3000h-60zM4380 0h60v3000h-60zM4440 0h60v3000h-60zM4500 0h60v3000h-60zM4620 0h60v3000h-60zM4680 0h60v3000h-60zM4920 0h60v3000h-60zM4980 0h60v3000h-60zM5040 0h60v3000h-60zM5160 0h60v3000h-60zM5280 0h60v3000h-60zM5340 0h60v3000h-60z"><text:p/></draw:path></draw:g><draw:frame draw:name="Shape 4" draw:style-name="gr4" draw:text-style-name="P4" svg:width="0.835in" svg:height="0.3157in" svg:x="4.3957in" svg:y="6.1417in"><draw:text-box><text:p text:style-name="P3">duck0</text:p></draw:text-box></draw:frame></draw:g><draw:g text:anchor-type="paragraph" draw:z-index="1" draw:name="DrawObject 2" draw:style-name="gr1"><draw:g draw:name="DrawObject 5" draw:style-name="gr2"><draw:path draw:name="Shape 1" draw:style-name="gr3" draw:text-style-name="P2" svg:width="2.1256in" svg:height="1.1807in" svg:x="0.3335in" svg:y="6.3965in" svg:viewBox="0 0 5400 3000" svg:d="M0 0h60v3000h-60zM60 0h60v3000h-60zM180 0h60v3000h-60zM360 0h60v3000h-60zM660 0h60v3000h-60zM960 0h60v3000h-60zM1140 0h60v3000h-60zM1200 0h60v3000h-60zM1320 0h60v3000h-60zM1500 0h60v3000h-60zM1560 0h60v3000h-60zM1620 0h60v3000h-60zM1680 0h60v3000h-60zM1860 0h60v3000h-60zM1980 0h60v3000h-60zM2280 0h60v3000h-60zM2400 0h60v3000h-60zM2460 0h60v3000h-60zM2640 0h60v3000h-60zM2700 0h60v3000h-60zM3000 0h60v3000h-60zM3180 0h60v3000h-60zM3300 0h60v3000h-60zM3360 0h60v3000h-60zM3420 0h60v3000h-60zM3600 0h60v3000h-60zM3720 0h60v3000h-60zM3780 0h60v3000h-60zM3960 0h60v3000h-60zM4020 0h60v3000h-60zM4260 0h60v3000h-60zM4500 0h60v3000h-60zM4620 0h60v3000h-60zM4680 0h60v3000h-60zM4920 0h60v3000h-60zM4980 0h60v3000h-60zM5040 0h60v3000h-60zM5160 0h60v3000h-60zM5280 0h60v3000h-60zM5340 0h60v3000h-60z"><text:p/></draw:path></draw:g><draw:frame draw:name="Shape 2" draw:style-name="gr4" draw:text-style-name="P4" svg:width="0.835in" svg:height="0.3157in" svg:x="0.9791in" svg:y="7.6272in"><draw:text-box><text:p text:style-name="P3">duck9</text:p></draw:text-box></draw:frame></draw:g><draw:g text:anchor-type="paragraph" draw:z-index="2" draw:name="DrawObject 4" draw:style-name="gr1"><draw:g draw:name="DrawObject 7" draw:style-name="gr2"><draw:path draw:name="Shape 7" draw:style-name="gr3" draw:text-style-name="P2" svg:width="1.8657in" svg:height="1.1807in" svg:x="3.8646in" svg:y="7.078in" svg:viewBox="0 0 4740 3000" svg:d="M0 0h60v3000h-60zM60 0h60v3000h-60zM180 0h60v3000h-60zM360 0h60v3000h-60zM660 0h60v3000h-60zM960 0h60v3000h-60zM1080 0h60v3000h-60zM1140 0h60v3000h-60zM1320 0h60v3000h-60zM1500 0h60v3000h-60zM1620 0h60v3000h-60zM1680 0h60v3000h-60zM1980 0h60v3000h-60zM2160 0h60v3000h-60zM2220 0h60v3000h-60zM2280 0h60v3000h-60zM2340 0h60v3000h-60zM2460 0h60v3000h-60zM2640 0h60v3000h-60zM2820 0h60v3000h-60zM2880 0h60v3000h-60zM2940 0h60v3000h-60zM3060 0h60v3000h-60zM3120 0h60v3000h-60zM3300 0h60v3000h-60zM3360 0h60v3000h-60zM3420 0h60v3000h-60zM3480 0h60v3000h-60zM3600 0h60v3000h-60zM3720 0h60v3000h-60zM3780 0h60v3000h-60zM3840 0h60v3000h-60zM3960 0h60v3000h-60zM4020 0h60v3000h-60zM4260 0h60v3000h-60zM4320 0h60v3000h-60zM4380 0h60v3000h-60zM4500 0h60v3000h-60zM4620 0h60v3000h-60zM4680 0h60v3000h-60z"><text:p/></draw:path></draw:g><draw:frame draw:name="Shape 8" draw:style-name="gr4" draw:text-style-name="P4" svg:width="0.6685in" svg:height="0.3157in" svg:x="4.4638in" svg:y="8.3087in"><draw:text-box><text:p text:style-name="P3">cat0</text:p></draw:text-box></draw:frame></draw:g><draw:g text:anchor-type="paragraph" draw:z-index="3" draw:name="DrawObject 6" draw:style-name="gr1"><draw:g draw:name="DrawObject 9" draw:style-name="gr2"><draw:path draw:name="Shape 5" draw:style-name="gr3" draw:text-style-name="P2" svg:width="1.8657in" svg:height="1.1807in" svg:x="0.448in" svg:y="8.5362in" svg:viewBox="0 0 4740 3000" svg:d="M0 0h60v3000h-60zM60 0h60v3000h-60zM180 0h60v3000h-60zM360 0h60v3000h-60zM660 0h60v3000h-60zM960 0h60v3000h-60zM1080 0h60v3000h-60zM1140 0h60v3000h-60zM1320 0h60v3000h-60zM1500 0h60v3000h-60zM1620 0h60v3000h-60zM1680 0h60v3000h-60zM1980 0h60v3000h-60zM2160 0h60v3000h-60zM2220 0h60v3000h-60zM2280 0h60v3000h-60zM2340 0h60v3000h-60zM2460 0h60v3000h-60zM2640 0h60v3000h-60zM2700 0h60v3000h-60zM2760 0h60v3000h-60zM2940 0h60v3000h-60zM3060 0h60v3000h-60zM3120 0h60v3000h-60zM3300 0h60v3000h-60zM3540 0h60v3000h-60zM3780 0h60v3000h-60zM3840 0h60v3000h-60zM3960 0h60v3000h-60zM4020 0h60v3000h-60zM4260 0h60v3000h-60zM4320 0h60v3000h-60zM4380 0h60v3000h-60zM4500 0h60v3000h-60zM4620 0h60v3000h-60zM4680 0h60v3000h-60z"><text:p/></draw:path></draw:g><draw:frame draw:name="Shape 6" draw:style-name="gr4" draw:text-style-name="P4" svg:width="0.6685in" svg:height="0.3157in" svg:x="1.0472in" svg:y="9.7669in"><draw:text-box><text:p text:style-name="P3">cat9</text:p></draw:text-box></draw:frame></draw:g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6:00:21.516128733</meta:creation-date>
    <dc:date>2023-01-21T16:47:48.888552561</dc:date>
    <meta:editing-duration>PT47M2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4.3.2$Linux_X86_64 LibreOffice_project/40$Build-2</meta:generator>
  </office:meta>
</office:document-meta>
</file>